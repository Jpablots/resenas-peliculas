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321" officeooo:paragraph-rsid="001f9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E LA APLICACIÓN EN LINEA:</text:p>
      <text:p text:style-name="P1">resenas-peliculas-production.up.railway.app</text:p>
      <text:p text:style-name="P1"/>
      <text:p text:style-name="P1">LINK DE LA CARPETA DRIVE CON EL VIDEO DEL MANUAL DE USUARIO:</text:p>
      <text:p text:style-name="P1">https://drive.google.com/drive/folders/1nWxjGfqHh_VbhUQkEO0drXN85w2YSDte?usp=sha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10:19:00.571009300</meta:creation-date>
    <dc:date>2026-06-03T10:20:42.864506900</dc:date>
    <meta:editing-duration>PT1M42S</meta:editing-duration>
    <meta:editing-cycles>1</meta:editing-cycles>
    <meta:document-statistic meta:table-count="0" meta:image-count="0" meta:object-count="0" meta:page-count="1" meta:paragraph-count="4" meta:word-count="20" meta:character-count="218" meta:non-whitespace-character-count="202"/>
    <meta:generator>LibreOffice/26.2.0.3$Windows_X86_64 LibreOffice_project/620$Build-3</meta:generator>
  </office:meta>
</office:document-meta>
</file>