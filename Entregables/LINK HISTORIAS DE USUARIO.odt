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aa4" officeooo:paragraph-rsid="001bfaa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CLICK UP CON LAS HISTORIAS DE USUARIO</text:p>
      <text:p text:style-name="Standard"/>
      <text:p text:style-name="Standard">https://app.clickup.com/90171254578/v/li/901713930023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1T23:34:06.402181100</meta:creation-date>
    <dc:date>2026-05-31T23:34:46.395890600</dc:date>
    <meta:editing-duration>PT40S</meta:editing-duration>
    <meta:editing-cycles>1</meta:editing-cycles>
    <meta:document-statistic meta:table-count="0" meta:image-count="0" meta:object-count="0" meta:page-count="1" meta:paragraph-count="2" meta:word-count="9" meta:character-count="95" meta:non-whitespace-character-count="88"/>
    <meta:generator>LibreOffice/26.2.0.3$Windows_X86_64 LibreOffice_project/620$Build-3</meta:generator>
  </office:meta>
</office:document-meta>
</file>